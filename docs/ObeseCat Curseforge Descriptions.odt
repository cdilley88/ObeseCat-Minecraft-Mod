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92c15" officeooo:paragraph-rsid="00192c15"/>
    </style:style>
    <style:style style:name="P2" style:family="paragraph" style:parent-style-name="Text_20_body">
      <style:text-properties officeooo:rsid="00192c15"/>
    </style:style>
    <style:style style:name="P3" style:family="paragraph" style:parent-style-name="Text_20_body" style:list-style-name="L1"/>
    <style:style style:name="P4" style:family="paragraph" style:parent-style-name="Text_20_body" style:list-style-name="L2"/>
    <style:style style:name="P5" style:family="paragraph" style:parent-style-name="Text_20_body" style:list-style-name="L3"/>
    <style:style style:name="P6" style:family="paragraph" style:parent-style-name="Text_20_body" style:list-style-name="L4"/>
    <style:style style:name="P7" style:family="paragraph" style:parent-style-name="Text_20_body" style:list-style-name="L5"/>
    <style:style style:name="P8" style:family="paragraph" style:parent-style-name="Text_20_body" style:list-style-name="L6"/>
    <style:style style:name="P9" style:family="paragraph" style:parent-style-name="Text_20_body" style:list-style-name="L7"/>
    <style:style style:name="P10" style:family="paragraph" style:parent-style-name="Text_20_body" style:list-style-name="L8"/>
    <style:style style:name="P11" style:family="paragraph" style:parent-style-name="Text_20_body" style:list-style-name="L9"/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V1.0<text:line-break/># ObeseCat</text:p>
      <text:p text:style-name="P2">ObeseCat is a silly Minecraft mod built around one very important idea: what if a large orange-and-white cat named Fat Man could be fed questionable nuclear cat food?</text:p>
      <text:p text:style-name="P2">This mod adds Fat Man, a custom oversized cat, along with a collection of chaotic joke items, Paco-powered bark weapons, nuclear snacks, developer tools, and one extremely unnecessary toilet.</text:p>
      <text:p text:style-name="P2">## Features</text:p>
      <text:p text:style-name="P2">- Fat Man, a passive oversized orange-and-white cat<text:line-break/>- Obese Cat Spawn Egg<text:line-break/>- Plutonium Cat Food<text:line-break/>- Lithium Deuteride Cat Food<text:line-break/>- Paco, a bark-only chihuahua item<text:line-break/>- Multiple Paco variants with knockback, damage, fire, and explosive effects<text:line-break/>- Atomic Paco and J. Paco Barkkenheimer for maximum bad ideas<text:line-break/>- Boom Stick, Fire Stick, Fire Boom Stick, and BIG Fire Boom Stick developer tools<text:line-break/>- Atomic Fire effect<text:line-break/>- Villager trades and loot chest integration</text:p>
      <text:p text:style-name="P2">## Notes</text:p>
      <text:p text:style-name="P2">This mod is intentionally ridiculous. Some items are balanced for survival, while others are clearly creative-mode/dev-tool chaos. Use the high-powered explosive items carefully unless you are emotionally prepared to delete a landscape.</text:p>
      <text:p text:style-name="P2">## Compatibility</text:p>
      <text:p text:style-name="P2">Built for:</text:p>
      <text:p text:style-name="P2">- Minecraft 1.21.1<text:line-break/>- NeoForge 21.1.228</text:p>
      <text:p text:style-name="P2">Designed to work as a standalone NeoForge mod.</text:p>
      <text:p text:style-name="Text_20_body">V1.1</text:p>
      <text:h text:style-name="Heading_20_1" text:outline-level="1">ObeseCat</text:h>
      <text:p text:style-name="Text_20_body">ObeseCat is a silly Minecraft mod built around one very important scientific question: what if a huge orange-and-white cat named Fat Man could be fed increasingly questionable nuclear cat food, then handed a series of increasingly irresponsible bark-powered weapons?</text:p>
      <text:p text:style-name="Text_20_body">This mod adds Fat Man, a custom oversized cat, plus strange snacks, Paco-based weaponry, cursed utility items, weird loot, villager trades, and one extremely unnecessary toilet.</text:p>
      <text:h text:style-name="Heading_20_2" text:outline-level="2"><text:soft-page-break/>Features</text:h>
      <text:list text:style-name="L1">
        <text:list-item>
          <text:p text:style-name="P3">Fat Man, a passive oversized orange-and-white cat</text:p>
        </text:list-item>
        <text:list-item>
          <text:p text:style-name="P3">Obese Cat Spawn Egg</text:p>
        </text:list-item>
        <text:list-item>
          <text:p text:style-name="P3">Plutonium Cat Food</text:p>
        </text:list-item>
        <text:list-item>
          <text:p text:style-name="P3">Lithium Deuteride Cat Food</text:p>
        </text:list-item>
        <text:list-item>
          <text:p text:style-name="P3">Paco, a bark-only chihuahua item</text:p>
        </text:list-item>
        <text:list-item>
          <text:p text:style-name="P3">Paco variants with knockback, damage, fire, and explosive effects</text:p>
        </text:list-item>
        <text:list-item>
          <text:p text:style-name="P3">Atomic Paco and J. Paco Barkkenheimer for maximum bad decisions</text:p>
        </text:list-item>
        <text:list-item>
          <text:p text:style-name="P3">Night Vision Mr. Kitty, a wearable/usable utility item with the caption “He Sees Everything”</text:p>
        </text:list-item>
        <text:list-item>
          <text:p text:style-name="P3">Mr. Kitty’s Paws, because apparently cats can land on their feet and so can you</text:p>
        </text:list-item>
        <text:list-item>
          <text:p text:style-name="P3">Tiny Planet, Ember Singularity, Wormhole Ember, and Enigma Ember</text:p>
        </text:list-item>
        <text:list-item>
          <text:p text:style-name="P3">Boom Stick, Fire Stick, Fire Boom Stick, and BIG Fire Boom Stick developer tools</text:p>
        </text:list-item>
        <text:list-item>
          <text:p text:style-name="P3">Atomic Fire effect</text:p>
        </text:list-item>
        <text:list-item>
          <text:p text:style-name="P3">Villager trades, loot chest integration, and other ways to stumble into chaos</text:p>
        </text:list-item>
        <text:list-item>
          <text:p text:style-name="P3">An extremely unnecessary toilet, because the mod has standards and also no standards</text:p>
        </text:list-item>
      </text:list>
      <text:h text:style-name="Heading_20_2" text:outline-level="2" text:is-list-header="true">Item Obtainment Guide</text:h>
      <text:p text:style-name="Text_20_body">If you want to know how to get the stuff instead of just admiring it in creative mode, here’s the breakdown:</text:p>
      <text:h text:style-name="Heading_20_3" text:outline-level="3">Villager Trades</text:h>
      <text:p text:style-name="Text_20_body">These items are available from Farmer villagers:</text:p>
      <text:list text:style-name="L2">
        <text:list-item>
          <text:p text:style-name="P4">Fat Man Spawn Egg</text:p>
        </text:list-item>
        <text:list-item>
          <text:p text:style-name="P4">Plutonium Cat Food</text:p>
        </text:list-item>
        <text:list-item>
          <text:p text:style-name="P4">Paco</text:p>
        </text:list-item>
        <text:list-item>
          <text:p text:style-name="P4">Ember</text:p>
        </text:list-item>
        <text:list-item>
          <text:p text:style-name="P4">Mr. Kitty</text:p>
        </text:list-item>
      </text:list>
      <text:p text:style-name="Text_20_body">These items are available from Manhattan Physicists found in Manhattan Bunkers:</text:p>
      <text:list text:style-name="L3">
        <text:list-item>
          <text:p text:style-name="P5">Hellhound Paco</text:p>
        </text:list-item>
        <text:list-item>
          <text:p text:style-name="P5">Oppenheimer’s Hat</text:p>
        </text:list-item>
      </text:list>
      <text:h text:style-name="Heading_20_3" text:outline-level="3" text:is-list-header="true"><text:soft-page-break/>Loot Chests</text:h>
      <text:p text:style-name="Text_20_body">These items can be found in loot:</text:p>
      <text:list text:style-name="L4">
        <text:list-item>
          <text:p text:style-name="P6">Toilet - Simple Dungeon chests</text:p>
        </text:list-item>
        <text:list-item>
          <text:p text:style-name="P6">Mr. Kitty’s Paws - Simple Dungeon chests</text:p>
        </text:list-item>
        <text:list-item>
          <text:p text:style-name="P6">Night Vision Mr. Kitty - Bastion chests</text:p>
        </text:list-item>
        <text:list-item>
          <text:p text:style-name="P6">Lithium Deuteride Cat Food - End City Treasure chests</text:p>
        </text:list-item>
        <text:list-item>
          <text:p text:style-name="P6">Wormhole Ember - End City Treasure chests</text:p>
        </text:list-item>
        <text:list-item>
          <text:p text:style-name="P6">Enigma Ember - End City Treasure chests</text:p>
        </text:list-item>
      </text:list>
      <text:h text:style-name="Heading_20_3" text:outline-level="3" text:is-list-header="true">Crafting</text:h>
      <text:p text:style-name="Text_20_body">These items are crafted from other ObeseCat items and vanilla ingredients:</text:p>
      <text:list text:style-name="L5">
        <text:list-item>
          <text:p text:style-name="P7">Concussive Paco - Paco + Piston</text:p>
        </text:list-item>
        <text:list-item>
          <text:p text:style-name="P7">Attack Paco - Concussive Paco + Diamond</text:p>
        </text:list-item>
        <text:list-item>
          <text:p text:style-name="P7">Assault Paco - Attack Paco + Nether Star</text:p>
        </text:list-item>
        <text:list-item>
          <text:p text:style-name="P7">Sniper Paco - Assault Paco + Nether Star + Spyglass</text:p>
        </text:list-item>
        <text:list-item>
          <text:p text:style-name="P7">Atomic Paco - Hellhound Paco + Plutonium Cat Food</text:p>
        </text:list-item>
        <text:list-item>
          <text:p text:style-name="P7">J. Paco Barkkenheimer - Atomic Paco + Oppenheimer’s Hat</text:p>
        </text:list-item>
        <text:list-item>
          <text:p text:style-name="P7">Tiny Planet - Mr. Kitty + Nether Star</text:p>
        </text:list-item>
        <text:list-item>
          <text:p text:style-name="P7">Ember Singularity - Ember + Eyes of Ender</text:p>
        </text:list-item>
      </text:list>
      <text:h text:style-name="Heading_20_3" text:outline-level="3" text:is-list-header="true">Special / Derived</text:h>
      <text:p text:style-name="Text_20_body">These come from specific mod interactions rather than normal crafting or trading:</text:p>
      <text:list text:style-name="L6">
        <text:list-item>
          <text:p text:style-name="P8">Trinitite - created when Fat Man detonates from Lithium Deuteride Cat Food</text:p>
        </text:list-item>
        <text:list-item>
          <text:p text:style-name="P8">Manhattan Bunker - generated world structure</text:p>
        </text:list-item>
        <text:list-item>
          <text:p text:style-name="P8">Manhattan Physicist - spawns inside the bunker structure and handles the special trades</text:p>
        </text:list-item>
      </text:list>
      <text:h text:style-name="Heading_20_3" text:outline-level="3" text:is-list-header="true">Creative / Developer Tools</text:h>
      <text:p text:style-name="Text_20_body">These are mainly for testing, debugging, or chaos:</text:p>
      <text:list text:style-name="L7">
        <text:list-item>
          <text:p text:style-name="P9">Boom Stick</text:p>
        </text:list-item>
        <text:list-item>
          <text:p text:style-name="P9">Fire Stick</text:p>
        </text:list-item>
        <text:list-item>
          <text:p text:style-name="P9">Fire Boom Stick</text:p>
        </text:list-item>
        <text:list-item>
          <text:p text:style-name="P9">BIG Fire Boom Stick</text:p>
        </text:list-item>
      </text:list>
      <text:h text:style-name="Heading_20_2" text:outline-level="2" text:is-list-header="true"><text:soft-page-break/>Notes</text:h>
      <text:p text:style-name="Text_20_body">This mod is intentionally ridiculous. Some items are balanced for survival progression, while others are clearly creative-mode tools or developer-style chaos.</text:p>
      <text:p text:style-name="Text_20_body">The rule of thumb is simple:</text:p>
      <text:list text:style-name="L8">
        <text:list-item>
          <text:p text:style-name="P10">If it looks useful, it probably is</text:p>
        </text:list-item>
        <text:list-item>
          <text:p text:style-name="P10">If it looks dangerous, it absolutely is</text:p>
        </text:list-item>
        <text:list-item>
          <text:p text:style-name="P10">If it looks like a joke, it might still delete a landscape</text:p>
        </text:list-item>
      </text:list>
      <text:p text:style-name="Text_20_body">Use the explosive items carefully unless you are emotionally prepared to explain a crater to everyone on the server.</text:p>
      <text:h text:style-name="Heading_20_2" text:outline-level="2">Compatibility</text:h>
      <text:p text:style-name="Text_20_body">Built for:</text:p>
      <text:list text:style-name="L9">
        <text:list-item>
          <text:p text:style-name="P11">Minecraft 1.21.1</text:p>
        </text:list-item>
        <text:list-item>
          <text:p text:style-name="P11">NeoForge 21.1.228</text:p>
        </text:list-item>
      </text:list>
      <text:p text:style-name="Text_20_body">Designed to work as a standalone NeoForge mod.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6-27T10:00:23.302959600</meta:creation-date>
    <dc:date>2026-06-27T13:34:41.299105700</dc:date>
    <meta:editing-duration>PT3H24M</meta:editing-duration>
    <meta:editing-cycles>1</meta:editing-cycles>
    <meta:document-statistic meta:table-count="0" meta:image-count="0" meta:object-count="0" meta:page-count="4" meta:paragraph-count="83" meta:word-count="771" meta:character-count="4498" meta:non-whitespace-character-count="3857"/>
    <meta:generator>LibreOffice/26.2.4.2$Windows_X86_64 LibreOffice_project/0229ac93fcf0d7cbc6376066c6f35021cef002dc</meta:generator>
  </office:meta>
</office:document-meta>
</file>